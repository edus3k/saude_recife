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6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7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🏥 Tema</text:h>
      <text:p text:style-name="Text_20_body"><text:span text:style-name="Strong_20_Emphasis">Qualidade do atendimento nas UPAs/UBS da cidade do Recife utilizando análise de dados do SUS</text:span></text:p>
      <text:p text:style-name="Horizontal_20_Line"/>
      <text:h text:style-name="Heading_20_1" text:outline-level="1">🧠 🔍 PROBLEMA</text:h>
      <text:p text:style-name="Text_20_body">As unidades de saúde frequentemente enfrentam:</text:p>
      <text:list text:style-name="L1">
        <text:list-item>
          <text:p text:style-name="P1">superlotação </text:p>
        </text:list-item>
        <text:list-item>
          <text:p text:style-name="P1">distribuição desigual de atendimentos </text:p>
        </text:list-item>
        <text:list-item>
          <text:p text:style-name="P2">falta de previsibilidade de demanda </text:p>
        </text:list-item>
      </text:list>
      <text:p text:style-name="Text_20_body">👉 Isso impacta diretamente a <text:span text:style-name="Strong_20_Emphasis">qualidade do atendimento</text:span></text:p>
      <text:p text:style-name="Horizontal_20_Line"/>
      <text:h text:style-name="Heading_20_1" text:outline-level="1">🎯 OBJETIVO</text:h>
      <text:p text:style-name="Text_20_body">Analisar dados reais do SUS para identificar:</text:p>
      <text:list text:style-name="L2">
        <text:list-item>
          <text:p text:style-name="P3">especialidades mais demandadas </text:p>
        </text:list-item>
        <text:list-item>
          <text:p text:style-name="P3">horários de maior fluxo </text:p>
        </text:list-item>
        <text:list-item>
          <text:p text:style-name="P3">regiões mais sobrecarregadas </text:p>
        </text:list-item>
        <text:list-item>
          <text:p text:style-name="P4">unidades com maior volume de atendimento</text:p>
        </text:list-item>
      </text:list>
      <text:h text:style-name="Heading_20_1" text:outline-level="1">🌐 📥 FONTE DE DADOS (OFICIAL)</text:h>
      <text:p text:style-name="Text_20_body">Você vai usar:</text:p>
      <text:list text:style-name="L3">
        <text:list-item>
          <text:p text:style-name="P5">DATASUS </text:p>
        </text:list-item>
        <text:list-item>
          <text:p text:style-name="P6">OpenDataSUS </text:p>
        </text:list-item>
      </text:list>
      <text:h text:style-name="Heading_20_3" text:outline-level="3">Dados usados:</text:h>
      <text:list text:style-name="L4">
        <text:list-item>
          <text:p text:style-name="P7"><text:span text:style-name="Strong_20_Emphasis">SIA/SUS (Produção Ambulatorial)</text:span> </text:p>
        </text:list-item>
        <text:list-item>
          <text:p text:style-name="P8"><text:span text:style-name="Strong_20_Emphasis">CNES (Unidades de saúde)</text:span> </text:p>
        </text:list-item>
      </text:list>
      <text:p text:style-name="Text_20_body">👉 Volume: <text:span text:style-name="Strong_20_Emphasis">+500MB (Big Data real)</text:span></text:p>
      <text:h text:style-name="Heading_20_1" text:outline-level="1"><text:soft-page-break/></text:h>
      <text:h text:style-name="Heading_20_1" text:outline-level="1">🏗️ 📁 ESTRUTURA FINAL DO PROJETO</text:h>
      <text:p text:style-name="Text_20_body"/>
      <text:section text:style-name="Sect1" text:name="code-block-viewer">
        <text:p text:style-name="Preformatted_20_Text"><text:span text:style-name="Source_20_Text">projeto_saude_recife/</text:span></text:p>
        <text:p text:style-name="Preformatted_20_Text"><text:span text:style-name="Source_20_Text">│</text:span></text:p>
        <text:p text:style-name="Preformatted_20_Text"><text:span text:style-name="Source_20_Text">├── apresentacao/</text:span></text:p>
        <text:p text:style-name="Preformatted_20_Text"><text:span text:style-name="Source_20_Text">│ <text:s text:c="2"/>└── apresentacao.pptx</text:span></text:p>
        <text:p text:style-name="Preformatted_20_Text"><text:span text:style-name="Source_20_Text">│</text:span></text:p>
        <text:p text:style-name="Preformatted_20_Text"><text:span text:style-name="Source_20_Text">├── dashboard/</text:span></text:p>
        <text:p text:style-name="Preformatted_20_Text"><text:span text:style-name="Source_20_Text">│ <text:s text:c="2"/>└── dashboard.py</text:span></text:p>
        <text:p text:style-name="Preformatted_20_Text"><text:span text:style-name="Source_20_Text">│</text:span></text:p>
        <text:p text:style-name="Preformatted_20_Text"><text:span text:style-name="Source_20_Text">├── data/</text:span></text:p>
        <text:p text:style-name="Preformatted_20_Text"><text:span text:style-name="Source_20_Text">│ <text:s text:c="2"/>├── dados_bruto/</text:span></text:p>
        <text:p text:style-name="Preformatted_20_Text"><text:span text:style-name="Source_20_Text">│ <text:s text:c="2"/>│ <text:s text:c="2"/>├── PA202401.dbc</text:span></text:p>
        <text:p text:style-name="Preformatted_20_Text"><text:span text:style-name="Source_20_Text">│ <text:s text:c="2"/>│ <text:s text:c="2"/>├── PA202402.dbc</text:span></text:p>
        <text:p text:style-name="Preformatted_20_Text"><text:span text:style-name="Source_20_Text">│ <text:s text:c="2"/>│ <text:s text:c="2"/>└── ...</text:span></text:p>
        <text:p text:style-name="Preformatted_20_Text"><text:span text:style-name="Source_20_Text">│ <text:s text:c="2"/>│</text:span></text:p>
        <text:p text:style-name="Preformatted_20_Text"><text:span text:style-name="Source_20_Text">│ <text:s text:c="2"/>└── dados_tratados/</text:span></text:p>
        <text:p text:style-name="Preformatted_20_Text"><text:span text:style-name="Source_20_Text">│ <text:s text:c="6"/>├── dados_tratados.csv</text:span></text:p>
        <text:p text:style-name="Preformatted_20_Text"><text:span text:style-name="Source_20_Text">│ <text:s text:c="6"/>└── resumo.csv</text:span></text:p>
        <text:p text:style-name="Preformatted_20_Text"><text:span text:style-name="Source_20_Text">│</text:span></text:p>
        <text:p text:style-name="Preformatted_20_Text"><text:span text:style-name="Source_20_Text">├── src/</text:span></text:p>
        <text:p text:style-name="Preformatted_20_Text"><text:span text:style-name="Source_20_Text">│ <text:s text:c="2"/>├── coleta.py</text:span></text:p>
        <text:p text:style-name="Preformatted_20_Text"><text:span text:style-name="Source_20_Text">│ <text:s text:c="2"/>├── limpeza.py</text:span></text:p>
        <text:p text:style-name="Preformatted_20_Text"><text:span text:style-name="Source_20_Text">│ <text:s text:c="2"/>├── processamento.py</text:span></text:p>
        <text:p text:style-name="Preformatted_20_Text"><text:span text:style-name="Source_20_Text">│ <text:s text:c="2"/>├── analise.py</text:span></text:p>
        <text:p text:style-name="Preformatted_20_Text"><text:span text:style-name="Source_20_Text">│ <text:s text:c="2"/>├── visualizacao.py</text:span></text:p>
        <text:p text:style-name="Preformatted_20_Text"><text:span text:style-name="Source_20_Text">│ <text:s text:c="2"/>├── previsao.py</text:span></text:p>
        <text:p text:style-name="Preformatted_20_Text"><text:span text:style-name="Source_20_Text">│ <text:s text:c="2"/>└── etl.py <text:s text:c="2"/>✅ (orquestrador)</text:span></text:p>
        <text:p text:style-name="Preformatted_20_Text"><text:span text:style-name="Source_20_Text">│</text:span></text:p>
        <text:p text:style-name="Preformatted_20_Text"><text:span text:style-name="Source_20_Text">├── notebooks/</text:span></text:p>
        <text:p text:style-name="Preformatted_20_Text"><text:span text:style-name="Source_20_Text">│ <text:s text:c="2"/>└── analise.ipynb</text:span></text:p>
        <text:p text:style-name="Preformatted_20_Text"><text:span text:style-name="Source_20_Text">│</text:span></text:p>
        <text:p text:style-name="Preformatted_20_Text"><text:span text:style-name="Source_20_Text">├── relatorio/</text:span></text:p>
        <text:p text:style-name="Preformatted_20_Text"><text:span text:style-name="Source_20_Text">│ <text:s text:c="2"/>└── documentacao.pdf</text:span></text:p>
        <text:p text:style-name="Preformatted_20_Text"><text:span text:style-name="Source_20_Text">│</text:span></text:p>
        <text:p text:style-name="Preformatted_20_Text"><text:span text:style-name="Source_20_Text">├── main.py <text:s text:c="2"/>✅ (opcional, mas recomendado)</text:span></text:p>
        <text:p text:style-name="Preformatted_20_Text"><text:span text:style-name="Source_20_Text">├── README.md</text:span></text:p>
        <text:p text:style-name="P9"><text:span text:style-name="Source_20_Text">└── requirements.txt</text:span></text:p>
      </text:section>
      <text:h text:style-name="Heading_20_1" text:outline-level="1">⚙️ 🔄 ETL (PIPELINE COMPLETO)</text:h>
      <text:h text:style-name="Heading_20_2" text:outline-level="2">EXTRACT</text:h>
      <text:list text:style-name="L5">
        <text:list-item>
          <text:p text:style-name="P10">leitura dos arquivos <text:span text:style-name="Source_20_Text">.dbc</text:span> </text:p>
        </text:list-item>
      </text:list>
      <text:h text:style-name="Heading_20_2" text:outline-level="2">TRANSFORM</text:h>
      <text:list text:style-name="L6">
        <text:list-item>
          <text:p text:style-name="P11">limpeza </text:p>
        </text:list-item>
        <text:list-item>
          <text:p text:style-name="P11">filtragem (Recife) </text:p>
        </text:list-item>
        <text:list-item>
          <text:p text:style-name="P12">agregação </text:p>
        </text:list-item>
      </text:list>
      <text:h text:style-name="Heading_20_2" text:outline-level="2"><text:soft-page-break/>LOAD</text:h>
      <text:list text:style-name="L7">
        <text:list-item>
          <text:p text:style-name="P13">salvar CSV tratado</text:p>
        </text:list-item>
      </text:list>
      <text:h text:style-name="Heading_20_1" text:outline-level="1">📊 DASHBOARD (STREAMLIT)</text:h>
      <text:h text:style-name="Heading_20_2" text:outline-level="2">Funcionalidades:</text:h>
      <text:list text:style-name="L8">
        <text:list-item>
          <text:p text:style-name="P14">filtro por unidade </text:p>
        </text:list-item>
        <text:list-item>
          <text:p text:style-name="P14">gráfico por especialidade </text:p>
        </text:list-item>
        <text:list-item>
          <text:p text:style-name="P14">gráfico por horário </text:p>
        </text:list-item>
        <text:list-item>
          <text:p text:style-name="P15">ranking de UPAs</text:p>
        </text:list-item>
      </text:list>
      <text:h text:style-name="Heading_20_1" text:outline-level="1">📈 ANÁLISES IMPORTANTES</text:h>
      <text:p text:style-name="Text_20_body">Você vai mostrar:</text:p>
      <text:h text:style-name="Heading_20_3" text:outline-level="3">✔ Especialidades mais demandadas</text:h>
      <text:h text:style-name="Heading_20_3" text:outline-level="3">✔ Horários de pico</text:h>
      <text:h text:style-name="Heading_20_3" text:outline-level="3">✔ Regiões com maior fluxo</text:h>
      <text:h text:style-name="Heading_20_3" text:outline-level="3">✔ Unidades mais sobrecarregadas</text:h>
      <text:p text:style-name="Horizontal_20_Line"/>
      <text:h text:style-name="Heading_20_1" text:outline-level="1">📊 📑 RELATÓRIO (README.md)</text:h>
      <text:h text:style-name="Heading_20_2" text:outline-level="2">Estrutura:</text:h>
      <text:h text:style-name="Heading_20_3" text:outline-level="3">1. Introdução</text:h>
      <text:h text:style-name="Heading_20_3" text:outline-level="3">2. Problema</text:h>
      <text:h text:style-name="Heading_20_3" text:outline-level="3">3. Objetivo</text:h>
      <text:h text:style-name="Heading_20_3" text:outline-level="3">4. Metodologia</text:h>
      <text:list text:style-name="L9">
        <text:list-item>
          <text:p text:style-name="P16">coleta </text:p>
        </text:list-item>
        <text:list-item>
          <text:p text:style-name="P16">ETL </text:p>
        </text:list-item>
        <text:list-item>
          <text:p text:style-name="P17">análise </text:p>
        </text:list-item>
      </text:list>
      <text:h text:style-name="Heading_20_3" text:outline-level="3"><text:soft-page-break/>5. Resultados</text:h>
      <text:h text:style-name="Heading_20_3" text:outline-level="3">6. Conclusão</text:h>
      <text:h text:style-name="Heading_20_1" text:outline-level="1">🎓 📊 SLIDES (PRONTOS PRA APRESENTAÇÃO)</text:h>
      <text:h text:style-name="Heading_20_2" text:outline-level="2">Slide 1 — Título</text:h>
      <text:p text:style-name="Text_20_body">Qualidade do atendimento nas UPAs/UBS do Recife</text:p>
      <text:p text:style-name="Horizontal_20_Line"/>
      <text:h text:style-name="Heading_20_2" text:outline-level="2">Slide 2 — Problema</text:h>
      <text:list text:style-name="L10">
        <text:list-item>
          <text:p text:style-name="P18">superlotação </text:p>
        </text:list-item>
        <text:list-item>
          <text:p text:style-name="P19">falta de dados </text:p>
        </text:list-item>
      </text:list>
      <text:p text:style-name="Horizontal_20_Line"/>
      <text:h text:style-name="Heading_20_2" text:outline-level="2">Slide 3 — Objetivo</text:h>
      <text:list text:style-name="L11">
        <text:list-item>
          <text:p text:style-name="P20">analisar dados </text:p>
        </text:list-item>
        <text:list-item>
          <text:p text:style-name="P21">melhorar gestão </text:p>
        </text:list-item>
      </text:list>
      <text:p text:style-name="Horizontal_20_Line"/>
      <text:h text:style-name="Heading_20_2" text:outline-level="2">Slide 4 — Fonte de dados</text:h>
      <text:list text:style-name="L12">
        <text:list-item>
          <text:p text:style-name="P22">DATASUS </text:p>
        </text:list-item>
        <text:list-item>
          <text:p text:style-name="P23">OpenDataSUS </text:p>
        </text:list-item>
      </text:list>
      <text:p text:style-name="Horizontal_20_Line"/>
      <text:h text:style-name="Heading_20_2" text:outline-level="2">Slide 5 — Metodologia</text:h>
      <text:list text:style-name="L13">
        <text:list-item>
          <text:p text:style-name="P24">ETL </text:p>
        </text:list-item>
        <text:list-item>
          <text:p text:style-name="P24">análise </text:p>
        </text:list-item>
        <text:list-item>
          <text:p text:style-name="P25">dashboard </text:p>
        </text:list-item>
      </text:list>
      <text:p text:style-name="Horizontal_20_Line"/>
      <text:h text:style-name="Heading_20_2" text:outline-level="2">Slide 6 — Dashboard</text:h>
      <text:p text:style-name="Text_20_body">(print do sistema rodando)</text:p>
      <text:p text:style-name="Horizontal_20_Line"/>
      <text:h text:style-name="Heading_20_2" text:outline-level="2"><text:soft-page-break/>Slide 7 — Resultados</text:h>
      <text:list text:style-name="L14">
        <text:list-item>
          <text:p text:style-name="P26">clínico geral → maior demanda </text:p>
        </text:list-item>
        <text:list-item>
          <text:p text:style-name="P27">pico → tarde/noite </text:p>
        </text:list-item>
      </text:list>
      <text:p text:style-name="Horizontal_20_Line"/>
      <text:h text:style-name="Heading_20_2" text:outline-level="2">Slide 8 — Conclusão</text:h>
      <text:list text:style-name="L15">
        <text:list-item>
          <text:p text:style-name="P28">dados ajudam na gestão pública </text:p>
        </text:list-item>
        <text:list-item>
          <text:p text:style-name="P29">possível reduzir sobrecarga </text:p>
        </text:list-item>
      </text:list>
      <text:p text:style-name="Horizontal_20_Line"/>
      <text:h text:style-name="Heading_20_2" text:outline-level="2">Slide 9 — Impacto social</text:h>
      <text:list text:style-name="L16">
        <text:list-item>
          <text:p text:style-name="P30">melhora atendimento </text:p>
        </text:list-item>
        <text:list-item>
          <text:p text:style-name="P31">melhor distribuição de recursos </text:p>
        </text:list-item>
      </text:list>
      <text:p text:style-name="Horizontal_20_Line"/>
      <text:h text:style-name="Heading_20_2" text:outline-level="2">Slide 10 — Futuro</text:h>
      <text:list text:style-name="L17">
        <text:list-item>
          <text:p text:style-name="P32">previsão com IA </text:p>
        </text:list-item>
        <text:list-item>
          <text:p text:style-name="P33">integração com mapas </text:p>
        </text:list-item>
      </text:list>
      <text:h text:style-name="Heading_20_1" text:outline-level="1">🎓 COMO EXPLICAR NA APRESENTAÇÃO</text:h>
      <text:p text:style-name="Text_20_body">Você pode dizer:</text:p>
      <text:p text:style-name="Quotations">“O projeto foi estruturado em módulos, onde cada etapa do ETL é separada, garantindo organização, reutilização e escalabilidade do código.”</text:p>
      <text:h text:style-name="Heading_20_1" text:outline-level="1">🎯 COMO EXPLICAR (APRESENTAÇÃO)</text:h>
      <text:p text:style-name="Quotations">“Foi desenvolvido um script de conversão automática para transformar arquivos DBC do DATASUS em CSV, facilitando o processamento e análise dos dados.”</text:p>
      <text:h text:style-name="Heading_20_1" text:outline-level="1">🎓 FRASE PRONTA (APRESENTAÇÃO)</text:h>
      <text:p text:style-name="Quotations">“Optou-se pela utilização do TabWin, ferramenta oficial do DATASUS, para garantir confiabilidade na conversão dos arquivos DBC para DBF antes do processamento em Python.”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5-01T22:15:34.442262400</dc:date>
    <meta:editing-duration>PT5M10S</meta:editing-duration>
    <meta:editing-cycles>4</meta:editing-cycles>
    <meta:generator>LibreOffice/26.2.0.3$Windows_X86_64 LibreOffice_project/620$Build-3</meta:generator>
    <meta:document-statistic meta:table-count="0" meta:image-count="0" meta:object-count="0" meta:page-count="6" meta:paragraph-count="128" meta:word-count="483" meta:character-count="2985" meta:non-whitespace-character-count="2567"/>
  </office:meta>
</office:document-meta>
</file>