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oteiro de Apresentação</text:h>
      <text:h text:style-name="Heading_20_2" text:outline-level="2">Projeto: Análise da Qualidade de Atendimento nas Unidades de Saúde do Recife</text:h>
      <text:p text:style-name="Horizontal_20_Line"/>
      <text:h text:style-name="Heading_20_1" text:outline-level="1">1. ABERTURA</text:h>
      <text:p text:style-name="Text_20_body">Bom dia/boa tarde a todos.</text:p>
      <text:p text:style-name="Text_20_body">Meu nome é ______________________ e hoje apresentarei o projeto:</text:p>
      <text:h text:style-name="Heading_20_1" text:outline-level="1">“Análise da Qualidade de Atendimento nas Unidades de Saúde do Recife”</text:h>
      <text:p text:style-name="Text_20_body">Este projeto foi desenvolvido utilizando Python, análise de dados e visualização interativa com Streamlit.</text:p>
      <text:p text:style-name="Text_20_body">O principal objetivo foi analisar indicadores relacionados ao atendimento nas unidades de saúde do Recife, permitindo identificar padrões, problemas e oportunidades de melhoria através da ciência de dados.</text:p>
      <text:p text:style-name="Horizontal_20_Line"/>
      <text:h text:style-name="Heading_20_1" text:outline-level="1">2. CONTEXTUALIZAÇÃO DO PROBLEMA</text:h>
      <text:p text:style-name="Text_20_body">A saúde pública é um dos setores mais importantes da sociedade.</text:p>
      <text:p text:style-name="Text_20_body">Entretanto, muitos desafios ainda existem:</text:p>
      <text:list text:style-name="L1">
        <text:list-item>
          <text:p text:style-name="P1">superlotação;</text:p>
        </text:list-item>
        <text:list-item>
          <text:p text:style-name="P1">demora no atendimento;</text:p>
        </text:list-item>
        <text:list-item>
          <text:p text:style-name="P1">falta de recursos;</text:p>
        </text:list-item>
        <text:list-item>
          <text:p text:style-name="P1">dificuldade no monitoramento de indicadores;</text:p>
        </text:list-item>
        <text:list-item>
          <text:p text:style-name="P2">e necessidade de decisões mais rápidas e eficientes.</text:p>
        </text:list-item>
      </text:list>
      <text:p text:style-name="Text_20_body">Diante disso, o uso de dados torna-se fundamental.</text:p>
      <text:p text:style-name="Text_20_body">A análise de dados permite transformar grandes volumes de informações em conhecimento estratégico para apoiar gestores públicos e melhorar o atendimento à população.</text:p>
      <text:p text:style-name="Horizontal_20_Line"/>
      <text:h text:style-name="Heading_20_1" text:outline-level="1">3. OBJETIVO DO PROJETO</text:h>
      <text:p text:style-name="Text_20_body">O objetivo principal deste projeto foi desenvolver um dashboard interativo capaz de:</text:p>
      <text:list text:style-name="L2">
        <text:list-item>
          <text:p text:style-name="P3"><text:soft-page-break/>analisar dados das unidades de saúde;</text:p>
        </text:list-item>
        <text:list-item>
          <text:p text:style-name="P3">acompanhar métricas de atendimento;</text:p>
        </text:list-item>
        <text:list-item>
          <text:p text:style-name="P3">visualizar indicadores importantes;</text:p>
        </text:list-item>
        <text:list-item>
          <text:p text:style-name="P3">identificar tendências;</text:p>
        </text:list-item>
        <text:list-item>
          <text:p text:style-name="P4">e facilitar a tomada de decisão.</text:p>
        </text:list-item>
      </text:list>
      <text:p text:style-name="Text_20_body">Além disso, o projeto busca demonstrar como ferramentas de Big Data e Business Intelligence podem ser aplicadas na área da saúde pública.</text:p>
      <text:p text:style-name="Horizontal_20_Line"/>
      <text:h text:style-name="Heading_20_1" text:outline-level="1">4. BASES DE DADOS UTILIZADAS</text:h>
      <text:p text:style-name="Text_20_body">Para o desenvolvimento do projeto foram utilizadas bases públicas de dados, incluindo:</text:p>
      <text:list text:style-name="L3">
        <text:list-item>
          <text:p text:style-name="P5">Dados do portal dados.gov.br;</text:p>
        </text:list-item>
        <text:list-item>
          <text:p text:style-name="P5">Informações do DataSUS;</text:p>
        </text:list-item>
        <text:list-item>
          <text:p text:style-name="P5">Arquivos em formato CSV;</text:p>
        </text:list-item>
        <text:list-item>
          <text:p text:style-name="P6">Dados relacionados a atendimentos e indicadores de saúde.</text:p>
        </text:list-item>
      </text:list>
      <text:p text:style-name="Text_20_body">Essas informações foram tratadas e organizadas para permitir análises mais precisas.</text:p>
      <text:p text:style-name="Horizontal_20_Line"/>
      <text:h text:style-name="Heading_20_1" text:outline-level="1">5. TECNOLOGIAS UTILIZADAS</text:h>
      <text:p text:style-name="Text_20_body">As principais tecnologias utilizadas foram:</text:p>
      <text:h text:style-name="Heading_20_2" text:outline-level="2">Python</text:h>
      <text:p text:style-name="Text_20_body">Linguagem principal utilizada no desenvolvimento.</text:p>
      <text:h text:style-name="Heading_20_2" text:outline-level="2">Pandas</text:h>
      <text:p text:style-name="Text_20_body">Utilizado para tratamento, limpeza e análise dos dados.</text:p>
      <text:h text:style-name="Heading_20_2" text:outline-level="2">Plotly</text:h>
      <text:p text:style-name="Text_20_body">Responsável pelos gráficos interativos.</text:p>
      <text:h text:style-name="Heading_20_2" text:outline-level="2">Streamlit</text:h>
      <text:p text:style-name="Text_20_body">Ferramenta utilizada para criação do dashboard web.</text:p>
      <text:h text:style-name="Heading_20_2" text:outline-level="2">SQL</text:h>
      <text:p text:style-name="Text_20_body">Utilizado em consultas e agregações de dados.</text:p>
      <text:p text:style-name="Text_20_body">Essas tecnologias permitiram criar uma aplicação moderna, interativa e eficiente.</text:p>
      <text:p text:style-name="Horizontal_20_Line"/>
      <text:h text:style-name="Heading_20_1" text:outline-level="1"><text:soft-page-break/>6. ESTRUTURA DO SISTEMA</text:h>
      <text:p text:style-name="Text_20_body">O sistema foi dividido em múltiplas páginas para facilitar a navegação.</text:p>
      <text:p text:style-name="Text_20_body">Entre elas:</text:p>
      <text:list text:style-name="L4">
        <text:list-item>
          <text:p text:style-name="P7">Página inicial;</text:p>
        </text:list-item>
        <text:list-item>
          <text:p text:style-name="P7">Visão geral;</text:p>
        </text:list-item>
        <text:list-item>
          <text:p text:style-name="P7">Indicadores e métricas;</text:p>
        </text:list-item>
        <text:list-item>
          <text:p text:style-name="P7">Evolução temporal;</text:p>
        </text:list-item>
        <text:list-item>
          <text:p text:style-name="P8">Conclusão do projeto.</text:p>
        </text:list-item>
      </text:list>
      <text:p text:style-name="Text_20_body">Cada página apresenta informações específicas através de gráficos, tabelas e indicadores visuais.</text:p>
      <text:p text:style-name="Horizontal_20_Line"/>
      <text:h text:style-name="Heading_20_1" text:outline-level="1">7. FUNCIONAMENTO DO DASHBOARD</text:h>
      <text:p text:style-name="Text_20_body">Ao abrir o sistema, o usuário visualiza uma página inicial com informações do projeto.</text:p>
      <text:p text:style-name="Text_20_body">Em seguida, é possível acessar os painéis analíticos.</text:p>
      <text:p text:style-name="Text_20_body">Os dados são processados automaticamente e exibidos em tempo real através de:</text:p>
      <text:list text:style-name="L5">
        <text:list-item>
          <text:p text:style-name="P9">gráficos interativos;</text:p>
        </text:list-item>
        <text:list-item>
          <text:p text:style-name="P9">métricas resumidas;</text:p>
        </text:list-item>
        <text:list-item>
          <text:p text:style-name="P9">análises comparativas;</text:p>
        </text:list-item>
        <text:list-item>
          <text:p text:style-name="P10">e indicadores estatísticos.</text:p>
        </text:list-item>
      </text:list>
      <text:p text:style-name="Text_20_body">Isso permite uma interpretação mais rápida e intuitiva dos dados.</text:p>
      <text:p text:style-name="Horizontal_20_Line"/>
      <text:h text:style-name="Heading_20_1" text:outline-level="1">8. PRINCIPAIS ANÁLISES REALIZADAS</text:h>
      <text:p text:style-name="Text_20_body">Entre as análises realizadas no projeto estão:</text:p>
      <text:h text:style-name="Heading_20_2" text:outline-level="2">Indicadores de atendimento</text:h>
      <text:p text:style-name="Text_20_body">Avaliação da quantidade de atendimentos realizados.</text:p>
      <text:h text:style-name="Heading_20_2" text:outline-level="2">Evolução temporal</text:h>
      <text:p text:style-name="Text_20_body">Análise do comportamento dos dados ao longo do tempo.</text:p>
      <text:h text:style-name="Heading_20_2" text:outline-level="2">Comparações entre unidades</text:h>
      <text:p text:style-name="Text_20_body">Identificação de diferenças entre unidades de saúde.</text:p>
      <text:h text:style-name="Heading_20_2" text:outline-level="2"><text:soft-page-break/>Métricas estatísticas</text:h>
      <text:p text:style-name="Text_20_body">Cálculo de médias, totais e indicadores gerais.</text:p>
      <text:p text:style-name="Text_20_body">Essas análises ajudam a identificar padrões importantes para a gestão pública.</text:p>
      <text:p text:style-name="Horizontal_20_Line"/>
      <text:h text:style-name="Heading_20_1" text:outline-level="1">9. IMPORTÂNCIA DO PROJETO</text:h>
      <text:p text:style-name="Text_20_body">Este projeto demonstra como a tecnologia pode contribuir diretamente para melhorias na saúde pública.</text:p>
      <text:p text:style-name="Text_20_body">Com dashboards analíticos é possível:</text:p>
      <text:list text:style-name="L6">
        <text:list-item>
          <text:p text:style-name="P11">reduzir o tempo de análise;</text:p>
        </text:list-item>
        <text:list-item>
          <text:p text:style-name="P11">melhorar a visualização dos dados;</text:p>
        </text:list-item>
        <text:list-item>
          <text:p text:style-name="P11">apoiar decisões estratégicas;</text:p>
        </text:list-item>
        <text:list-item>
          <text:p text:style-name="P11">identificar gargalos no atendimento;</text:p>
        </text:list-item>
        <text:list-item>
          <text:p text:style-name="P12">e aumentar a eficiência da gestão.</text:p>
        </text:list-item>
      </text:list>
      <text:p text:style-name="Text_20_body">Além disso, o projeto também possui grande relevância acadêmica por integrar programação, análise de dados e Business Intelligence.</text:p>
      <text:p text:style-name="Horizontal_20_Line"/>
      <text:h text:style-name="Heading_20_1" text:outline-level="1">10. DESAFIOS ENCONTRADOS</text:h>
      <text:p text:style-name="Text_20_body">Durante o desenvolvimento do projeto, alguns desafios foram encontrados:</text:p>
      <text:list text:style-name="L7">
        <text:list-item>
          <text:p text:style-name="P13">tratamento de dados inconsistentes;</text:p>
        </text:list-item>
        <text:list-item>
          <text:p text:style-name="P13">organização das bases;</text:p>
        </text:list-item>
        <text:list-item>
          <text:p text:style-name="P13">padronização das informações;</text:p>
        </text:list-item>
        <text:list-item>
          <text:p text:style-name="P13">desenvolvimento das visualizações;</text:p>
        </text:list-item>
        <text:list-item>
          <text:p text:style-name="P14">e otimização da performance do dashboard.</text:p>
        </text:list-item>
      </text:list>
      <text:p text:style-name="Text_20_body">Esses desafios contribuíram para ampliar o aprendizado técnico e analítico.</text:p>
      <text:p text:style-name="Horizontal_20_Line"/>
      <text:h text:style-name="Heading_20_1" text:outline-level="1">11. RESULTADOS OBTIDOS</text:h>
      <text:p text:style-name="Text_20_body">Os resultados obtidos foram bastante positivos.</text:p>
      <text:p text:style-name="Text_20_body">O dashboard desenvolvido conseguiu:</text:p>
      <text:list text:style-name="L8">
        <text:list-item>
          <text:p text:style-name="P15">centralizar informações;</text:p>
        </text:list-item>
        <text:list-item>
          <text:p text:style-name="P15">gerar visualizações claras;</text:p>
        </text:list-item>
        <text:list-item>
          <text:p text:style-name="P15">facilitar análises;</text:p>
        </text:list-item>
        <text:list-item>
          <text:p text:style-name="P16">e transformar dados brutos em informações úteis.</text:p>
        </text:list-item>
      </text:list>
      <text:p text:style-name="Text_20_body"><text:soft-page-break/>O projeto também demonstrou a aplicabilidade prática de Python e ciência de dados na área da saúde.</text:p>
      <text:p text:style-name="Horizontal_20_Line"/>
      <text:h text:style-name="Heading_20_1" text:outline-level="1">12. CONSIDERAÇÕES FINAIS</text:h>
      <text:p text:style-name="Text_20_body">Concluímos que a análise de dados possui papel fundamental na modernização da saúde pública.</text:p>
      <text:p text:style-name="Text_20_body">Ferramentas de Business Intelligence permitem maior eficiência, melhor acompanhamento de indicadores e apoio à tomada de decisão.</text:p>
      <text:p text:style-name="Text_20_body">Este projeto reforça a importância da tecnologia como ferramenta estratégica para melhorar serviços públicos e promover inovação.</text:p>
      <text:p text:style-name="Horizontal_20_Line"/>
      <text:h text:style-name="Heading_20_1" text:outline-level="1">13. ENCERRAMENTO</text:h>
      <text:p text:style-name="Text_20_body">Agradeço a atenção de todos.</text:p>
      <text:p text:style-name="Text_20_body">Estou à disposição para responder perguntas e apresentar mais detalhes sobre o funcionamento do sistema.</text:p>
      <text:p text:style-name="Text_20_body">Muito obrigado.</text:p>
      <text:p text:style-name="Horizontal_20_Line"/>
      <text:h text:style-name="Heading_20_1" text:outline-level="1">DICAS PARA APRESENTAÇÃO</text:h>
      <text:list text:style-name="L9">
        <text:list-item>
          <text:p text:style-name="P17">Falar de forma clara e objetiva;</text:p>
        </text:list-item>
        <text:list-item>
          <text:p text:style-name="P17">Manter contato visual com o público;</text:p>
        </text:list-item>
        <text:list-item>
          <text:p text:style-name="P17">Explicar os gráficos de maneira simples;</text:p>
        </text:list-item>
        <text:list-item>
          <text:p text:style-name="P17">Demonstrar segurança ao apresentar o dashboard;</text:p>
        </text:list-item>
        <text:list-item>
          <text:p text:style-name="P17">Evitar leitura totalmente mecânica;</text:p>
        </text:list-item>
        <text:list-item>
          <text:p text:style-name="P18">Destacar os benefícios sociais do projeto.</text:p>
        </text:list-item>
      </text:list>
      <text:p text:style-name="Horizontal_20_Line"/>
      <text:h text:style-name="Heading_20_1" text:outline-level="1">TEMPO MÉDIO DE APRESENTAÇÃO</text:h>
      <text:list text:style-name="L10">
        <text:list-item>
          <text:p text:style-name="P19">Apresentação completa: 8 a 12 minutos;</text:p>
        </text:list-item>
        <text:list-item>
          <text:p text:style-name="P20">Versão resumida: 5 minuto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6T13:33:08.755456700</meta:creation-date>
    <dc:date>2026-05-26T13:33:10.579374500</dc:date>
    <meta:editing-duration>PT2S</meta:editing-duration>
    <meta:editing-cycles>1</meta:editing-cycles>
    <meta:document-statistic meta:table-count="0" meta:image-count="0" meta:object-count="0" meta:page-count="5" meta:paragraph-count="118" meta:word-count="794" meta:character-count="5410" meta:non-whitespace-character-count="4779"/>
    <meta:generator>LibreOffice/26.2.3.2$Windows_X86_64 LibreOffice_project/70e089b17412e4cb7773e41413306b17a2328c34</meta:generator>
  </office:meta>
</office:document-meta>
</file>